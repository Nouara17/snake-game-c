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ébut</text:p>
      <text:p text:style-name="Standard"/>
      <text:p text:style-name="Standard"><text:span text:style-name="T2">1. Initialisation du jeu :.</text:span></text:p>
      <text:p text:style-name="Standard"><text:span text:style-name="T2"/></text:p>
      <text:p text:style-name="Standard"><text:s text:c="8"/>- Définir la taille de la grille (WIDTH x HEIGHT)</text:p>
      <text:p text:style-name="Standard"><text:s text:c="8"/>- Initialiser la position du serpent au centre de la grille</text:p>
      <text:p text:style-name="Standard"><text:s text:c="8"/>- Définir la direction initiale du serpent (Droite)</text:p>
      <text:p text:style-name="Standard"><text:s text:c="8"/>- Générer un fruit à une position aléatoire</text:p>
      <text:p text:style-name="Standard"><text:s text:c="8"/>- Initialiser le score à 0</text:p>
      <text:p text:style-name="Standard"/>
      <text:p text:style-name="Standard"><text:span text:style-name="T2">2. Boucle principale (le jeu continue jusqu'à la fin) :</text:span></text:p>
      <text:p text:style-name="Standard"><text:span text:style-name="T2"/></text:p>
      <text:p text:style-name="Standard"><text:s text:c="8"/>Tant que le jeu n'est pas terminé faire :</text:p>
      <text:p text:style-name="Standard"><text:s text:c="12"/>- Afficher la grille de jeu (drawBoard)</text:p>
      <text:p text:style-name="Standard"><text:s text:c="12"/>- Lire l'entrée du joueur pour changer la direction (handleInput)</text:p>
      <text:p text:style-name="Standard"><text:s text:c="12"/>- Mettre à jour la position du serpent (updateSnake)</text:p>
      <text:p text:style-name="Standard"><text:s text:c="12"/>- Attendre un court instant pour gérer la vitesse du jeu (usleep)</text:p>
      <text:p text:style-name="Standard"/>
      <text:p text:style-name="Standard"><text:s text:c="4"/>Fin Boucle</text:p>
      <text:p text:style-name="Standard"/>
      <text:p text:style-name="Standard">Fin</text:p>
      <text:p text:style-name="Standard"/>
      <text:p text:style-name="Standard"/>
      <text:h text:style-name="Heading_20_3" text:outline-level="3"><text:span text:style-name="Strong_20_Emphasis">Détails des sous-algorithmes :</text:span></text:h>
      <text:h text:style-name="Heading_20_4" text:outline-level="4"><text:span text:style-name="Strong_20_Emphasis">1. Afficher la grille de jeu (</text:span><text:span text:style-name="Strong_20_Emphasis"><text:span text:style-name="Source_20_Text">drawBoard</text:span></text:span><text:span text:style-name="Strong_20_Emphasis">)</text:span></text:h>
      <text:p text:style-name="Preformatted_20_Text">plaintext</text:p>
      <text:p text:style-name="Preformatted_20_Text">CopierModifier</text:p>
      <text:p text:style-name="P2"><text:span text:style-name="Source_20_Text">Procédure drawBoard</text:span></text:p>
      <text:p text:style-name="P2"><text:span text:style-name="Source_20_Text"><text:s text:c="4"/>- Effacer l’écran</text:span></text:p>
      <text:p text:style-name="P2"><text:span text:style-name="Source_20_Text"><text:s text:c="4"/>- Pour chaque ligne y de 0 à HEIGHT - 1 :</text:span></text:p>
      <text:p text:style-name="P2"><text:span text:style-name="Source_20_Text"><text:s text:c="8"/>- Pour chaque colonne x de 0 à WIDTH - 1 :</text:span></text:p>
      <text:p text:style-name="P2"><text:span text:style-name="Source_20_Text"><text:s text:c="12"/>- Si c'est un mur, afficher '#'</text:span></text:p>
      <text:p text:style-name="P2"><text:span text:style-name="Source_20_Text"><text:s text:c="12"/>- Sinon, si c'est une partie du serpent, afficher 'O'</text:span></text:p>
      <text:p text:style-name="P2"><text:span text:style-name="Source_20_Text"><text:s text:c="12"/>- Sinon, si c'est un fruit, afficher '*'</text:span></text:p>
      <text:p text:style-name="P2"><text:span text:style-name="Source_20_Text"><text:s text:c="12"/>- Sinon, afficher un espace ' '</text:span></text:p>
      <text:p text:style-name="P2"><text:span text:style-name="Source_20_Text"><text:s text:c="4"/>- Afficher le score</text:span></text:p>
      <text:p text:style-name="P3"><text:span text:style-name="Source_20_Text">Fin Procédure</text:span></text:p>
      <text:h text:style-name="Heading_20_4" text:outline-level="4"><text:span text:style-name="Strong_20_Emphasis">2. Vérifier la saisie du joueur (</text:span><text:span text:style-name="Strong_20_Emphasis"><text:span text:style-name="Source_20_Text">handleInput</text:span></text:span><text:span text:style-name="Strong_20_Emphasis">)</text:span></text:h>
      <text:p text:style-name="Preformatted_20_Text">plaintext</text:p>
      <text:p text:style-name="Preformatted_20_Text">Copier le code</text:p>
      <text:p text:style-name="P2"><text:span text:style-name="Source_20_Text">Procédure handleInput</text:span></text:p>
      <text:p text:style-name="P2"><text:span text:style-name="Source_20_Text"><text:s text:c="4"/>- Si une touche est pressée :</text:span></text:p>
      <text:p text:style-name="P2"><text:span text:style-name="Source_20_Text"><text:s text:c="8"/>- Lire la touche</text:span></text:p>
      <text:p text:style-name="P2"><text:span text:style-name="Source_20_Text"><text:s text:c="8"/>- Modifier la direction du serpent en fonction de la touche :</text:span></text:p>
      <text:p text:style-name="P2"><text:span text:style-name="Source_20_Text"><text:s text:c="12"/>- 'z' (haut) → UP</text:span></text:p>
      <text:p text:style-name="P2"><text:span text:style-name="Source_20_Text"><text:s text:c="12"/>- 's' (bas) → DOWN</text:span></text:p>
      <text:p text:style-name="P2"><text:span text:style-name="Source_20_Text"><text:s text:c="12"/>- 'q' (gauche) → LEFT</text:span></text:p>
      <text:p text:style-name="P2"><text:span text:style-name="Source_20_Text"><text:s text:c="12"/>- 'd' (droite) → RIGHT</text:span></text:p>
      <text:p text:style-name="P3"><text:span text:style-name="Source_20_Text">Fin Procédure</text:span></text:p>
      <text:h text:style-name="Heading_20_4" text:outline-level="4"><text:span text:style-name="Strong_20_Emphasis">3. Mettre à jour le serpent (</text:span><text:span text:style-name="Strong_20_Emphasis"><text:span text:style-name="Source_20_Text">updateSnake</text:span></text:span><text:span text:style-name="Strong_20_Emphasis">)</text:span></text:h>
      <text:p text:style-name="Preformatted_20_Text">plaintext</text:p>
      <text:p text:style-name="Preformatted_20_Text"><text:soft-page-break/>Copier le code</text:p>
      <text:p text:style-name="P2"><text:span text:style-name="Source_20_Text">Procédure updateSnake</text:span></text:p>
      <text:p text:style-name="P2"><text:span text:style-name="Source_20_Text"><text:s text:c="4"/>- Calculer la nouvelle position de la tête du serpent selon la direction :</text:span></text:p>
      <text:p text:style-name="P2"><text:span text:style-name="Source_20_Text"><text:s text:c="8"/>- UP → y - 1</text:span></text:p>
      <text:p text:style-name="P2"><text:span text:style-name="Source_20_Text"><text:s text:c="8"/>- DOWN → y + 1</text:span></text:p>
      <text:p text:style-name="P2"><text:span text:style-name="Source_20_Text"><text:s text:c="8"/>- LEFT → x - 1</text:span></text:p>
      <text:p text:style-name="P2"><text:span text:style-name="Source_20_Text"><text:s text:c="8"/>- RIGHT → x + 1</text:span></text:p>
      <text:p text:style-name="P2"/>
      <text:p text:style-name="P2"><text:span text:style-name="Source_20_Text"><text:s text:c="4"/>- Vérifier si le serpent entre en collision :</text:span></text:p>
      <text:p text:style-name="P2"><text:span text:style-name="Source_20_Text"><text:s text:c="8"/>- Si oui, afficher "Game Over" et arrêter le programme</text:span></text:p>
      <text:p text:style-name="P2"/>
      <text:p text:style-name="P2"><text:span text:style-name="Source_20_Text"><text:s text:c="4"/>- Déplacer le corps du serpent :</text:span></text:p>
      <text:p text:style-name="P2"><text:span text:style-name="Source_20_Text"><text:s text:c="8"/>- Décaler chaque segment du corps vers l’avant</text:span></text:p>
      <text:p text:style-name="P2"/>
      <text:p text:style-name="P2"><text:span text:style-name="Source_20_Text"><text:s text:c="4"/>- Vérifier si le serpent mange un fruit :</text:span></text:p>
      <text:p text:style-name="P2"><text:span text:style-name="Source_20_Text"><text:s text:c="8"/>- Si oui, augmenter la taille du serpent et générer un nouveau fruit</text:span></text:p>
      <text:p text:style-name="P2"/>
      <text:p text:style-name="P3"><text:span text:style-name="Source_20_Text">Fin Procédure</text:span></text:p>
      <text:h text:style-name="Heading_20_4" text:outline-level="4"><text:span text:style-name="Strong_20_Emphasis">4. Vérifier la collision (</text:span><text:span text:style-name="Strong_20_Emphasis"><text:span text:style-name="Source_20_Text">checkCollision</text:span></text:span><text:span text:style-name="Strong_20_Emphasis">)</text:span></text:h>
      <text:p text:style-name="Preformatted_20_Text">plaintext</text:p>
      <text:p text:style-name="Preformatted_20_Text">Copier le code</text:p>
      <text:p text:style-name="P2"><text:span text:style-name="Source_20_Text">Fonction checkCollision(nouvelle_tête)</text:span></text:p>
      <text:p text:style-name="P2"><text:span text:style-name="Source_20_Text"><text:s text:c="4"/>- Si la tête du serpent touche un mur → Retourner VRAI</text:span></text:p>
      <text:p text:style-name="P2"><text:span text:style-name="Source_20_Text"><text:s text:c="4"/>- Si la tête touche son propre corps → Retourner VRAI</text:span></text:p>
      <text:p text:style-name="P2"><text:span text:style-name="Source_20_Text"><text:s text:c="4"/>- Sinon → Retourner FAUX</text:span></text:p>
      <text:p text:style-name="P3"><text:span text:style-name="Source_20_Text">Fin Fonction</text:span></text:p>
      <text:h text:style-name="Heading_20_4" text:outline-level="4"><text:span text:style-name="Strong_20_Emphasis">5. Vérifier si un fruit est mangé (</text:span><text:span text:style-name="Strong_20_Emphasis"><text:span text:style-name="Source_20_Text">checkFruit</text:span></text:span><text:span text:style-name="Strong_20_Emphasis">)</text:span></text:h>
      <text:p text:style-name="Preformatted_20_Text">plaintext</text:p>
      <text:p text:style-name="Preformatted_20_Text">Copier le code</text:p>
      <text:p text:style-name="P2"><text:span text:style-name="Source_20_Text">Fonction checkFruit(nouvelle_tête)</text:span></text:p>
      <text:p text:style-name="P2"><text:span text:style-name="Source_20_Text"><text:s text:c="4"/>- Si la position de la tête du serpent correspond à celle du fruit :</text:span></text:p>
      <text:p text:style-name="P2"><text:span text:style-name="Source_20_Text"><text:s text:c="8"/>- Retourner VRAI</text:span></text:p>
      <text:p text:style-name="P2"><text:span text:style-name="Source_20_Text"><text:s text:c="4"/>- Sinon :</text:span></text:p>
      <text:p text:style-name="P2"><text:span text:style-name="Source_20_Text"><text:s text:c="8"/>- Retourner FAUX</text:span></text:p>
      <text:p text:style-name="P3"><text:span text:style-name="Source_20_Text">Fin Fonction</text:span></text:p>
      <text:h text:style-name="Heading_20_4" text:outline-level="4"><text:span text:style-name="Strong_20_Emphasis">6. Générer un fruit à une position aléatoire (</text:span><text:span text:style-name="Strong_20_Emphasis"><text:span text:style-name="Source_20_Text">generateFruit</text:span></text:span><text:span text:style-name="Strong_20_Emphasis">)</text:span></text:h>
      <text:p text:style-name="Preformatted_20_Text">plaintext</text:p>
      <text:p text:style-name="Preformatted_20_Text">Copier le code</text:p>
      <text:p text:style-name="P2"><text:span text:style-name="Source_20_Text">Fonction generateFruit</text:span></text:p>
      <text:p text:style-name="P2"><text:span text:style-name="Source_20_Text"><text:s text:c="4"/>- Choisir une position aléatoire (x, y) qui ne contient pas le serpent</text:span></text:p>
      <text:p text:style-name="P2"><text:span text:style-name="Source_20_Text"><text:s text:c="4"/>- Retourner cette position</text:span></text:p>
      <text:p text:style-name="P3"><text:span text:style-name="Source_20_Text">Fin Foncti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0:17:51.254000000</meta:creation-date>
    <dc:date>2025-01-29T13:56:25.135000000</dc:date>
    <meta:editing-duration>PT3H36M6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81" meta:word-count="471" meta:character-count="2822" meta:non-whitespace-character-count="2080"/>
  </office:meta>
</office:document-meta>
</file>